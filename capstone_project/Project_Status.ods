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6.284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Day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number-columns-repeated="1020"/>
        </table:table-row>
        <table:table-row table:style-name="ro1">
          <table:table-cell table:style-name="ce2" office:value-type="float" office:value="1" table:number-columns-spanned="1" table:number-rows-spanned="7">
            <text:p>1</text:p>
          </table:table-cell>
          <table:table-cell office:value-type="string">
            <text:p>PRD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Github Repo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Environment Setup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Design Doc Roadmap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Design Choice Evaluatio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Market Research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Evaluations guardrails Observability Prod Testing Scenarios</text:p>
          </table:table-cell>
          <table:table-cell office:value-type="string">
            <text:p>Done</text:p>
          </table:table-cell>
          <table:table-cell office:value-type="string">
            <text:p>Guardrails and Prod Testing Scn</text:p>
          </table:table-cell>
          <table:table-cell table:number-columns-repeated="1020"/>
        </table:table-row>
        <table:table-row table:style-name="ro1">
          <table:table-cell table:style-name="ce2" office:value-type="float" office:value="2" table:number-columns-spanned="1" table:number-rows-spanned="3">
            <text:p>2</text:p>
          </table:table-cell>
          <table:table-cell office:value-type="string">
            <text:p>Test backend code end to end deployment, submit in Github, Code eval for the design choice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Added LLM Evaluation Metrics and Prometheus logging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Create Differentiator Upload page for all RAG project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3" table:number-columns-spanned="1" table:number-rows-spanned="4">
            <text:p>3</text:p>
          </table:table-cell>
          <table:table-cell office:value-type="string">
            <text:p>Streamlit End to end dpeloyment: definition of all widget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Communication b/w all widget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Default" office:value-type="string">
            <text:p>Observability, faithfullness implemented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Serving through FastAPI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string">
            <text:p>Migrate to PostgresSQL</text:p>
          </table:table-cell>
          <table:table-cell office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string">
            <text:p>implementation of <text:s/>langsmith</text:p>
          </table:table-cell>
          <table:table-cell office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string">
            <text:p>for demo we have done api calling, need to implement production level</text:p>
          </table:table-cell>
          <table:table-cell office:value-type="string">
            <text:p>in progress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vectordb-&gt;pinecone</text:p>
          </table:table-cell>
          <table:table-cell office:value-type="string">
            <text:p>yet to start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serve on Docker</text:p>
          </table:table-cell>
          <table:table-cell office:value-type="string">
            <text:p>yet to sta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yet to start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30">30/06/2026</text:date>, <text:time>07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6-30T07:45:21.82</dc:date>
    <meta:document-statistic meta:table-count="1" meta:cell-count="48" meta:object-count="0"/>
    <meta:generator>OpenOffice/4.1.15$Win32 OpenOffice.org_project/4115m2$Build-9813</meta:generator>
  </office:meta>
</office:document-meta>
</file>